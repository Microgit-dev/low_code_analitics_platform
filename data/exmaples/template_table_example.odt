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h text:outline-level="1">ODT Template with Table</text:h>
      <text:p>Example for table_data_records.data_json (name, count)</text:p>
      <table:table table:name="Aggregates">
        <table:table-column/>
        <table:table-column/>
        <table:table-row>
          <table:table-cell office:value-type="string">
            <text:p>Metric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otal rows</text:p>
          </table:table-cell>
          <table:table-cell office:value-type="string">
            <text:p>{{ count(*) }}</text:p>
          </table:table-cell>
        </table:table-row>
        <table:table-row>
          <table:table-cell office:value-type="string">
            <text:p>Rows where name exists</text:p>
          </table:table-cell>
          <table:table-cell office:value-type="string">
            <text:p>{{ count(name) }}</text:p>
          </table:table-cell>
        </table:table-row>
        <table:table-row>
          <table:table-cell office:value-type="string">
            <text:p>Sum of count</text:p>
          </table:table-cell>
          <table:table-cell office:value-type="string">
            <text:p>{{ sum(count) }}</text:p>
          </table:table-cell>
        </table:table-row>
        <table:table-row>
          <table:table-cell office:value-type="string">
            <text:p>Average count</text:p>
          </table:table-cell>
          <table:table-cell office:value-type="string">
            <text:p>{{ avg(count) }}</text:p>
          </table:table-cell>
        </table:table-row>
        <table:table-row>
          <table:table-cell office:value-type="string">
            <text:p>Minimum count</text:p>
          </table:table-cell>
          <table:table-cell office:value-type="string">
            <text:p>{{ min(count) }}</text:p>
          </table:table-cell>
        </table:table-row>
        <table:table-row>
          <table:table-cell office:value-type="string">
            <text:p>Maximum count</text:p>
          </table:table-cell>
          <table:table-cell office:value-type="string">
            <text:p>{{ max(count) }}</text:p>
          </table:table-cell>
        </table:table-row>
      </table:table>
    </office:text>
  </office:body>
</office:document-content>
</file>