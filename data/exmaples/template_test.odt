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mplate Test</text:p>
      <text:p text:style-name="P1">Table test for data_json = {"name": "jjj hahah write", "count": 8188}</text:p>
      <text:p text:style-name="P1">Total rows: {{ count(*) }}</text:p>
      <text:p text:style-name="P1">Rows where name exists: {{ count(name) }}</text:p>
      <text:p text:style-name="P1">Sum of count: {{ sum(count) }}</text:p>
      <text:p text:style-name="P1">Average of count: {{ avg(count) }}</text:p>
      <text:p text:style-name="P1">Min of count: {{ min(count) }}</text:p>
      <text:p text:style-name="P1">Max of count: {{ max(count) }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